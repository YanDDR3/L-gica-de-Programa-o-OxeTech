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7e2" officeooo:paragraph-rsid="000327e2"/>
    </style:style>
    <style:style style:name="P2" style:family="paragraph" style:parent-style-name="Standard">
      <style:paragraph-properties fo:text-align="justify" style:justify-single-word="false"/>
      <style:text-properties officeooo:rsid="000327e2" officeooo:paragraph-rsid="000327e2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327e2" officeooo:paragraph-rsid="000327e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54fc3" officeooo:paragraph-rsid="00054fc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4abea" officeooo:paragraph-rsid="0004abea"/>
    </style:style>
    <style:style style:name="P6" style:family="paragraph" style:parent-style-name="Standard">
      <style:paragraph-properties fo:text-align="justify" style:justify-single-word="false"/>
      <style:text-properties officeooo:rsid="00054fc3" officeooo:paragraph-rsid="00054f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</text:p>
      <text:p text:style-name="P1"/>
      <text:p text:style-name="P2">Conceito de algoritmo, Conjunto de passos definidos para chegar em determinado resultado. </text:p>
      <text:p text:style-name="P2"/>
      <text:p text:style-name="P2">Algoritmo passos definidos, finitos e organizados. </text:p>
      <text:p text:style-name="P2"/>
      <text:p text:style-name="P3">Importante, os fluxogramas, deixam a visualização da programação de forma simples. </text:p>
      <text:p text:style-name="P2"/>
      <text:p text:style-name="P2"/>
      <text:p text:style-name="P5">Sempre que for colocar um texto, tem de colocar “”</text:p>
      <text:p text:style-name="P5"/>
      <text:p text:style-name="P6">Comando escreva = serve para apresentar texto no shell.</text:p>
      <text:p text:style-name="P6"/>
      <text:p text:style-name="P4">Comando \n pula uma linha. </text:p>
      <text:p text:style-name="P4">Comando // se transforma em um comentário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0T15:43:40.467000000</meta:creation-date>
    <dc:date>2026-05-20T16:21:09.457000000</dc:date>
    <meta:editing-duration>PT6M58S</meta:editing-duration>
    <meta:editing-cycles>1</meta:editing-cycles>
    <meta:document-statistic meta:table-count="0" meta:image-count="0" meta:object-count="0" meta:page-count="1" meta:paragraph-count="8" meta:word-count="62" meta:character-count="405" meta:non-whitespace-character-count="346"/>
    <meta:generator>LibreOffice/7.3.0.3$Windows_X86_64 LibreOffice_project/0f246aa12d0eee4a0f7adcefbf7c878fc2238db3</meta:generator>
  </office:meta>
</office:document-meta>
</file>